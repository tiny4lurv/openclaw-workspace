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Heading_20_2">
      <style:paragraph-properties fo:margin-top="0in" fo:margin-bottom="0.0835in" loext:contextual-spacing="false" fo:line-height="114%" fo:padding="0in" fo:border="none"/>
    </style:style>
    <style:style style:name="P3" style:family="paragraph" style:parent-style-name="Heading_20_1" style:master-page-name="Standard">
      <style:paragraph-properties fo:margin-top="0in" fo:margin-bottom="0.0835in" loext:contextual-spacing="false" fo:line-height="114%" style:page-number="1" fo:padding="0in" fo:border="none"/>
    </style:style>
    <style:style style:name="P4" style:family="paragraph" style:parent-style-name="Heading_20_3">
      <style:paragraph-properties fo:margin-top="0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0b57d0" style:font-name="Google Sans" style:text-underline-style="solid" style:text-underline-width="auto" style:text-underline-color="font-color" style:font-name-asian="Google Sans1" style:font-name-complex="Google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ermanent Healthcare Staffing: Your Best Candidates Are Already in Your Unit</text:span></text:p>
      <text:p text:style-name="P1"><text:span text:style-name="T2">Primary keyword:</text:span><text:span text:style-name="T1"> permanent healthcare staffing</text:span></text:p>
      <text:p text:style-name="P1"><text:span text:style-name="T2">Secondary keyword:</text:span><text:span text:style-name="T1"> agency conversion fee</text:span></text:p>
      <text:p text:style-name="P1"><text:span text:style-name="T1">You have been running the most thorough hiring process in hospital staffing, and nobody told you it’s the best version of an interview you can have.</text:span></text:p>
      <text:p text:style-name="P1"><text:span text:style-name="T1">There is probably a travel nurse in your unit who has been in your facility for multiple 13-week stints. You have watched them work through full patient loads, rapid responses, short-staffed shifts, and the specific way your charge nurse delegates to them. Every shift was a data point, and every patient outcome was a reference check. Every time a preceptor adjusted an assignment around a learning curve instead of requesting a replacement, that was an evaluation. The 13-week contract may be treated as a category of staffing arrangements, but it is the most thorough interview your facility will ever run.</text:span></text:p>
      <text:p text:style-name="P1"><text:span text:style-name="T1">You already know you want them to stay on permanently, but there is a minefield here. First of all, you actually don't know whether they want to stay - maybe they just love to travel. There are signs they could settle under the right conditions, but there are documented reasons why clinicians continue to travel, even when they prefer not to. Then there is the travel agency. They have bailed you out numerous times when short-staffed during a spike in demand; you would not want to step on their toes. Not to mention, there is a significant conversion fee if your facility wants to make a travel nurse a permanent member of their staff.</text:span></text:p>
      <text:p text:style-name="P1"><text:span text:style-name="T1">You could engage a </text:span><text:a xlink:type="simple" xlink:href="https://navahc.com/is-diy-healthcare-recruiting-truly-cheaper/" text:style-name="ListLabel_20_1" text:visited-style-name="ListLabel_20_1"><text:span text:style-name="T3">recruitment agency</text:span></text:a><text:span text:style-name="T1"> to find you a permanent placement, even though they tend to prioritise speed over factors such as </text:span><text:a xlink:type="simple" xlink:href="https://navahc.com/bilingual-clinicians/" text:style-name="ListLabel_20_1" text:visited-style-name="ListLabel_20_1"><text:span text:style-name="T3">cultural concordance</text:span></text:a><text:span text:style-name="T1">. However, we believe the solution to this conundrum is right under your nose.</text:span></text:p>
      <text:p text:style-name="P2"><text:span text:style-name="T1">The Working Interview: The Math of Observed Competence</text:span></text:p>
      <text:p text:style-name="P1"><text:span text:style-name="T1">The transition to permanent healthcare staffing requires a fundamental shift in how facility leaders calculate the value of their current temporary workforce. While the initial impulse is often to view the agency contract as an expense to be minimized, a closer diagnostic audit reveals it to be the most rigorous vetting mechanism available in the modern clinical environment. By reframing these contracts as an evidence-based vetting period rather than a simple administrative bridge, organizations can move away from "mercenary" recruitment and toward a model of sustainable clinical excellence.</text:span></text:p>
      <text:p text:style-name="P4"><text:span text:style-name="T1">Beyond the Resume: The Power of Direct Observation</text:span></text:p>
      <text:p text:style-name="P1"><text:span text:style-name="T1">Traditional recruitment relies on a candidate's ability to self-report competence within the sterile environment of a one-hour interview, a process that primarily rewards polished storytelling rather than clinical reliability. In contrast, the 13-week working interview exposes the traveler to the actual stressors of the unit, revealing how they handle high patient acuity and team dynamics in real time. This unfiltered observation provides a level of predictive validity that no psychometric test or resume screen can replicate. Because every other assessment method asks evaluators to imagine competence rather than observe it, the 13-week stint stands alone as the only assessment that cannot be rehearsed or optimized for performance.</text:span></text:p>
      <text:p text:style-name="P1"><text:span text:style-name="T1">Because the facility is observing a clinician in their natural workflow, the administrative team can assess cultural fit across multiple shifts and interpersonal conflicts. Instead of imagining how a candidate might react to a crisis, the unit leadership has already witnessed the response. This direct observation effectively removes the "performance mask" that often obscures a candidate's true temperament during a standard hiring cycle and ensures that the move to permanent healthcare staffing is based on proven behavior rather than rehearsed answers. The facility is not guessing whether this person can perform; it has watched them perform hundreds of patient interactions before a single permanent offer is even discussed.</text:span></text:p>
      <text:p text:style-name="P4"><text:span text:style-name="T1">The $61,110 Factor: Quantifying Safety and Turnover Risk</text:span></text:p>
      <text:p text:style-name="P1"><text:span text:style-name="T1">The financial risk of an unsuccessful domestic hire remains one of the most significant threats to hospital margins. With the </text:span><text:a xlink:type="simple" xlink:href="https://navahc.com/the-anatomy-of-a-clinician-turnover/" text:style-name="ListLabel_20_1" text:visited-style-name="ListLabel_20_1"><text:span text:style-name="T3">average cost of replacing a single registered nurse reaching $61,110</text:span></text:a><text:span text:style-name="T1"> according to the </text:span><text:a xlink:type="simple" xlink:href="https://www.nsinursingsolutions.com/documents/library/nsi_national_health_care_retention_report.pdf" text:style-name="ListLabel_20_1" text:visited-style-name="ListLabel_20_1"><text:span text:style-name="T3">NSI National Health Care Retention Report</text:span></text:a><text:span text:style-name="T1">, a facility cannot afford the "</text:span><text:a xlink:type="simple" xlink:href="https://navahc.com/why-reactive-recruitment-in-healthcare-staffing-fails/" text:style-name="ListLabel_20_1" text:visited-style-name="ListLabel_20_1"><text:span text:style-name="T3">post and pray</text:span></text:a><text:span text:style-name="T1">" approach to permanent recruitment. Posting a job ad and praying they get a suitable clinician within the first 500 CVs submitted. When a leader converts a traveler who has already mastered the unit’s specific Electronic Medical Record (EMR) and supply chain protocols, they are essentially purchasing a guarantee of retention. The "bad hire" risk is mitigated because the orientation phase, which is often where new hires fail, was successfully navigated months ago.</text:span></text:p>
      <text:p text:style-name="P1"><text:span text:style-name="T1">Furthermore, week-one errors are not individual failures; they are a systemic cost of the 13-week reset. Medication errors, charting mistakes, and miscommunication during rapid response events all spike in the first three to four weeks of a new contract. This is not a reflection of the traveler’s competence, but a reflection of the fact that clinical practice requires localized knowledge that cannot be transported from one assignment to the next. Research indicates that units with high agency reliance see a </text:span><text:a xlink:type="simple" xlink:href="https://pmc.ncbi.nlm.nih.gov/articles/PMC11812648/" text:style-name="ListLabel_20_1" text:visited-style-name="ListLabel_20_1"><text:span text:style-name="T3">4% increase in unit-acquired pressure ulcers</text:span></text:a><text:span text:style-name="T1">; a clear signal that clinical continuity is a prerequisite for patient safety. You have already completed the most expensive part of hiring, at full productivity, with zero commitment required.</text:span></text:p>
      <text:p text:style-name="P4"><text:span text:style-name="T1">The Continuity Tax: Reclaiming Institutional Memory</text:span></text:p>
      <text:p text:style-name="P1"><text:span text:style-name="T1">Precepting may not be an accounting line item, but it is a measurable tax that your permanent staff pays in cognitive and emotional labor. Every time a new traveler arrives, experienced nurses spend the first two to four weeks in a coaching posture. Their workflows slow as they provide repeated explanations and the contextual orientation that no official training program can deliver. They answer questions about where supplies are stored and how the charge nurse prefers shift handoffs. This work is performed without additional compensation, at a pace that is measurably slower than their baseline. The traveler earns market rate during this period, while the preceptor absorbs the burden of onboarding someone who may leave in 90 days.</text:span></text:p>
      <text:p text:style-name="P1"><text:span text:style-name="T1">The facility is perpetually rebuilding from zero, paying the credentialing cost, and absorbing the error spike for a clinician who will soon depart. This tribal knowledge, accumulated over twelve weeks, does not transfer to the next arrival. Every new traveler requires credentialing verification and facility compliance orientation, consuming 8-20 hours of unbillable time absorbed by coordinators and IT staff. By prioritizing permanent healthcare staffing, a facility can end this cycle of administrative exhaustion and focus its resources on multi-year assets. Reclaiming institutional memory turns that fleeting knowledge into a permanent asset that compounds over time, rather than leaving the unit every quarter.</text:span></text:p>
      <text:p text:style-name="P2"><text:span text:style-name="T1">The Fee Is a Toll, Not a Service</text:span></text:p>
      <text:p text:style-name="P1"><text:span text:style-name="T1">It may be presented as one, but the conversion fee is anything but a true service charge. Rather, it is proof that the agency profits from your hesitation. Every dollar you pay at conversion is a needless addition to what was already earned during the contract period through the markup on hours worked. The fee exists not to cover a service; it exists to make you forget you have already completed the most expensive part of hiring. The conversion fee is meant to make the decision feel expensive when the math says otherwise.</text:span></text:p>
      <text:p text:style-name="P4"><text:span text:style-name="T1">The Psychological Architecture of Hesitation</text:span></text:p>
      <text:p text:style-name="P1"><text:span text:style-name="T1">Staffing agency conversion fees exist primarily as a pricing signal. The fee is calibrated not to reflect any service the agency provides at the point of conversion, but to make the facility feel as though conversion is the costly option; expensive enough to reconsider and explore extensions instead. The behavioral objective is hesitation, not obstruction. The fee does not block conversion outright; it creates a moment of doubt powerful enough to shift decisions that should be straightforward. This psychological barrier redirects the facility's attention away from the accumulated value of the traveler and toward a single, visible "penalty" number.</text:span></text:p>
      <text:p text:style-name="P1"><text:span text:style-name="T1">Furthermore, facilities that attempt conversion are not the agency's ideal outcome. The agency's preferred customer is one who extends the contract repeatedly, paying the 30 to 40% markup above base pay on every billable hour for as long as possible. The fee is the mechanism designed to prevent the interruption of predictable agency revenue, not something invented to solve a problem for the facility. By triggering a calculation of immediate costs versus long-term gains, the fee ensures that the facility remains in a state of operational indecision while securing the agency’s annuity.</text:span></text:p>
      <text:p text:style-name="P1"><text:span text:style-name="T1">Speaking of annuity, an agency’s preferred revenue stream is the "markup-and-extend" cycle, not a permanent placement. For a nurse earning a base rate of $40 per hour, an agency with a 35 percent markup bills the facility approximately $54 per hour. That’s no mere consolation prize for the agency; it is the product working exactly as it was designed to function.</text:span></text:p>
      <text:p text:style-name="P1"><text:span text:style-name="T1">By the end of the first thirteen weeks, the agency has already recovered its sourcing and credentialing costs through the markup collected during that period. Every extension beyond that point is pure margin. A converted nurse ends that revenue stream permanently, forcing the agency to invest in replacing that billable hour with a new clinician in a new facility. The financial incentive structure inside every staffing firm prioritizes retention within the agency over placement into the facility. This is the business model: keeping clinicians billable rather than delivering permanent healthcare staffing solutions. But, still, some try to find a way out through renegotiating terms.</text:span></text:p>
      <text:p text:style-name="P4"><text:soft-page-break/><text:span text:style-name="T1">Transactional Friction and the Volume Lock-In</text:span></text:p>
      <text:p text:style-name="P1"><text:span text:style-name="T1">When facilities attempt to negotiate these fees, agencies often use them as a lever to secure volume commitments or "exclusive provider" status. The fee is rarely waived without a trade-off that locks the facility into a deeper, long-term dependency on the agency’s pipeline. Instead of achieving permanence, the facility finds itself trading its future hiring autonomy for immediate relief on a single conversion. This transactional friction is a primary reason why traditional agency relationships rarely result in a stabilized workforce. The fee becomes a lever the agency uses to lock the facility into an extended relationship rather than a permanent one.</text:span></text:p>
      <text:p text:style-name="P1"><text:span text:style-name="T1">This "lock-in" effect forces leaders into a position where they must prioritize the agency relationship over unit health. Reclaimix is designed to dismantle this friction by focusing on the total cost of ownership and bypassing the traditional agency dependency. By auditing the contractual language and identifying the point of diminishing returns, a facility can reclaim its hiring authority. Permanent healthcare staffing requires the removal of these transactional barriers, allowing the facility to focus on the clinician’s fit rather than the agency’s exit tax. The moment the spreadsheet recalculates to include the cost of lock-in, the decision to convert becomes the only logical path forward.</text:span></text:p>
      <text:p text:style-name="P2"><text:span text:style-name="T1">The Direct Bridge: Reclaimix Addressing Career Risk and Infrastructure</text:span></text:p>
      <text:p text:style-name="P1"><text:span text:style-name="T1">The direct relationship between the clinician and the facility enables a direct hire, bypassing the conversion fee entirely. Removing the agency as an intermediary removes the mechanism the fee was designed to create. However, the bridge only holds if the facility addresses what keeps nurses in the traveler system: the career risk that makes the agency model feel safer than permanent employment. Building a direct bridge requires the implementation of permanent infrastructure rather than relying on a series of disconnected recruitment transactions.</text:span></text:p>
      <text:p text:style-name="P4"><text:span text:style-name="T1">The Direct Connection Between Clinician and Facility</text:span></text:p>
      <text:p text:style-name="P1"><text:span text:style-name="T1">When the relationship is managed directly between the nurse and the facility, without the agency as an intermediary, the conversion fee ceases to function as a structural barrier. The fee was designed to prevent exactly this connection; intended to keep the facility dependent on the agency pipeline and the nurse dependent on the agency billing structure. Removing the intermediary removes the mechanism. The conversation between the facility and the clinician can then focus on what actually matters: whether this specific assignment should become a permanent role. This is a fundamentally different dialogue that begins with the clinician’s goals and compensation expectations rather than with the agency's pricing structure.</text:span></text:p>
      <text:p text:style-name="P1"><text:span text:style-name="T1">Without the redirection of the agency toll, the facility and the clinician can have an honest discussion about whether this facility and assignment work for both of them in the long run. Such transparency shifts the focus away from budget anxiety and toward long-term alignment. The clinician is no longer viewed as a billable hour to be protected, but as a professional whose career path is the primary objective. By establishing this direct bridge, facilities can begin to build the kind of job embeddedness that is structurally impossible within the agency framework. The transition from guest to permanent colleague is finally allowed to proceed without outside interference.</text:span></text:p>
      <text:p text:style-name="P4"><text:span text:style-name="T1">Addressing the Structural Perception of Career Risk</text:span></text:p>
      <text:p text:style-name="P1"><text:span text:style-name="T1">Nurses often remain in the traveler system because it feels safer than exiting. The system delivers higher pay through tax-free stipends governed by the </text:span><text:a xlink:type="simple" xlink:href="https://advantismed.com/blog/travel-nurse-tax-home" text:style-name="ListLabel_20_1" text:visited-style-name="ListLabel_20_1"><text:span text:style-name="T3">IRS 12-month rule</text:span></text:a><text:span text:style-name="T1">; but it also provides geographic flexibility and an exit mechanism if a unit culture turns hostile or unsafe. These features are the actual product that agencies sell. The perception of safety is structural: agency nurses build no single client dependency, carry no obligation to any facility, and can exit any assignment without consequence. This independence is what makes staying in the traveler system feel rational, even when permanent employment would be financially better over time.</text:span></text:p>
      <text:p text:style-name="P1"><text:span text:style-name="T1">The direct bridge works only when crossing it feels less risky than staying on the traveler track. A direct conversion that addresses only the compensation gap will not displace the agency system if the nurse still perceives leaving the traveler track as surrendering their professional control. The program must address the compensation gap through competitive salary and benefits packaging; but it must also offer schedule predictability and professional development that the traveler system cannot provide. The facility must offer something structurally better, not just financially comparable. Only by addressing the benefits deficit and retirement contributions can a facility provide a "soft landing" that outweighs the allure of the road.</text:span></text:p>
      <text:p text:style-name="P4"><text:span text:style-name="T1">Recalculating the Total Cost of Ownership</text:span></text:p>
      <text:p text:style-name="P1"><text:span text:style-name="T1">The programs that build permanent pipelines operate on a fundamentally different model than recruitment agencies. An agency rents a clinician to a facility for a billable hour and has a financial incentive to extend that rental indefinitely. A workforce program, such as Reclaimix, invests in the relationship between the facility and the clinician with the goal of conversion. The number that should drive this decision is not the conversion fee; it is nurse retention through permanent placement. The $61,110 represents the average cost of replacing a single registered nurse, a figure that dwarfs what agencies typically quote because they never show it.</text:span></text:p>
      <text:p text:style-name="P1"><text:span text:style-name="T1">When the spreadsheet includes the full cost of perpetual turnover, including orientation hours, error spikes, and institutional knowledge loss that recurs every 13 weeks, conversion stops looking like the expensive option and starts looking like the only rational decision remaining. The fee was designed to keep your eyes on the wrong number; the moment the spreadsheet recalculates, the decision changes. The facility stops paying to onboard someone new every quarter and starts investing in a relationship that compounds over time. Permanent healthcare staffing is economically coherent only when you account for the recovery of lost institutional memory. </text:span><text:a xlink:type="simple" xlink:href="https://navahc.com/convert-agency-nurses-to-permanent-staff/" text:style-name="ListLabel_20_1" text:visited-style-name="ListLabel_20_1"><text:span text:style-name="T3">Stop looking for candidates in the wrong place</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color="#0b57d0" style:font-name="Google Sans" fo:font-family="'Google Sans'" style:font-family-generic="roman" style:font-pitch="variable" style:text-underline-style="solid" style:text-underline-width="auto" style:text-underline-color="font-color" style:font-name-asian="Google Sans1" style:font-family-asian="'Google Sans'" style:font-family-generic-asian="system" style:font-pitch-asian="variable" style:font-name-complex="Google Sans1" style:font-family-complex="'Google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2503" meta:character-count="16297" meta:non-whitespace-character-count="13833"/>
    <meta:generator>LibreOfficeDev/6.0.5.2$Linux_X86_64 LibreOffice_project/</meta:generator>
  </office:meta>
</office:document-meta>
</file>